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C0000041869BF1ADA.png" manifest:media-type="image/png"/>
  <manifest:file-entry manifest:full-path="Pictures/100000010000050C0000044634B570BB.png" manifest:media-type="image/png"/>
  <manifest:file-entry manifest:full-path="Pictures/10000001000002F900000446FBC0BA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237fb"/>
    </style:style>
    <style:style style:name="P2" style:family="paragraph" style:parent-style-name="Standard">
      <style:text-properties officeooo:rsid="000237fb" officeooo:paragraph-rsid="000237fb"/>
    </style:style>
    <style:style style:name="P3" style:family="paragraph" style:parent-style-name="Standard">
      <style:text-properties officeooo:rsid="00045df4" officeooo:paragraph-rsid="00045df4"/>
    </style:style>
    <style:style style:name="P4" style:family="paragraph" style:parent-style-name="Standard">
      <style:paragraph-properties fo:text-align="start" style:justify-single-word="false" fo:text-indent="0cm" style:auto-text-indent="false"/>
    </style:style>
    <style:style style:name="P5" style:family="paragraph" style:parent-style-name="Standard">
      <style:text-properties fo:color="#eecc64" loext:opacity="100%" style:font-name="Monospace" fo:font-size="10pt" fo:font-weight="bold" officeooo:rsid="00045df4" officeooo:paragraph-rsid="00045df4" style:font-size-asian="10pt" style:font-weight-asian="bold" style:font-weight-complex="bold"/>
    </style:style>
    <style:style style:name="T1" style:family="text">
      <style:text-properties officeooo:rsid="000237fb"/>
    </style:style>
    <style:style style:name="T2" style:family="text">
      <style:text-properties fo:color="#739eca" loext:opacity="100%" style:font-name="Monospace" fo:font-size="10pt" fo:font-weight="bold" style:font-size-asian="10pt" style:font-weight-asian="bold"/>
    </style:style>
    <style:style style:name="T3" style:family="text">
      <style:text-properties fo:color="#739eca" loext:opacity="100%" style:font-name="Monospace" fo:font-size="10pt" fo:font-weight="bold" style:font-size-asian="10pt" style:font-weight-asian="bold" style:font-weight-complex="bold"/>
    </style:style>
    <style:style style:name="T4" style:family="text">
      <style:text-properties fo:color="#cccccc" loext:opacity="100%" style:font-name="Monospace" fo:font-size="10pt" style:font-size-asian="10pt"/>
    </style:style>
    <style:style style:name="T5" style:family="text">
      <style:text-properties fo:color="#cccccc" loext:opacity="100%" style:font-name="Monospace" fo:font-size="10pt" fo:font-weight="bold" style:font-size-asian="10pt" style:font-weight-asian="bold" style:font-weight-complex="bold"/>
    </style:style>
    <style:style style:name="T6" style:family="text">
      <style:text-properties fo:color="#eecc64" loext:opacity="100%" style:font-name="Monospace" fo:font-size="10pt" style:font-size-asian="10pt"/>
    </style:style>
    <style:style style:name="T7" style:family="text">
      <style:text-properties fo:color="#eecc64" loext:opacity="100%" style:font-name="Monospace" fo:font-size="10pt" fo:font-weight="bold" style:font-size-asian="10pt" style:font-weight-asian="bold" style:font-weight-complex="bold"/>
    </style:style>
    <style:style style:name="T8" style:family="text">
      <style:text-properties style:font-name="Monospace" fo:font-size="10pt" style:font-size-asian="10pt"/>
    </style:style>
    <style:style style:name="T9" style:family="text">
      <style:text-properties fo:color="#b788d3" loext:opacity="100%" style:font-name="Monospace" fo:font-size="10pt" fo:font-style="italic" style:font-size-asian="10pt" style:font-style-asian="italic"/>
    </style:style>
    <style:style style:name="T10" style:family="text">
      <style:text-properties fo:color="#b788d3" loext:opacity="100%" style:font-name="Monospace" fo:font-size="10pt" fo:font-style="italic" fo:font-weight="bold" style:font-size-asian="10pt" style:font-style-asian="italic" style:font-weight-asian="bold" style:font-weight-complex="bold"/>
    </style:style>
    <style:style style:name="T11" style:family="text">
      <style:text-properties fo:color="#b788d3" loext:opacity="100%" style:font-name="Monospace" fo:font-size="10pt" style:font-size-asian="10pt"/>
    </style:style>
    <style:style style:name="T12" style:family="text">
      <style:text-properties fo:color="#00b8b8" loext:opacity="100%" style:font-name="Monospace" fo:font-size="10pt" style:font-size-asian="10pt"/>
    </style:style>
    <style:style style:name="T13" style:family="text">
      <style:text-properties fo:color="#00b8b8" loext:opacity="100%" style:font-name="Monospace" fo:font-size="10pt" fo:font-weight="bold" style:font-size-asian="10pt" style:font-weight-asian="bold" style:font-weight-complex="bold"/>
    </style:style>
    <style:style style:name="T14" style:family="text">
      <style:text-properties fo:color="#00b8b8" loext:opacity="100%" style:font-name="Monospace" fo:font-size="10pt" fo:font-style="italic" style:font-size-asian="10pt" style:font-style-asian="italic"/>
    </style:style>
    <style:style style:name="T15" style:family="text">
      <style:text-properties fo:color="#cc9b75" loext:opacity="100%" style:font-name="Monospace" fo:font-size="10pt" style:font-size-asian="10pt"/>
    </style:style>
    <style:style style:name="T16" style:family="text">
      <style:text-properties fo:color="#c1aa6c" loext:opacity="100%" style:font-name="Monospace" fo:font-size="10pt" fo:font-weight="bold" style:font-size-asian="10pt" style:font-weight-asian="bold"/>
    </style:style>
    <style:style style:name="T17" style:family="text">
      <style:text-properties fo:color="#cac580" loext:opacity="100%" style:font-name="Monospace" fo:font-size="10pt" style:font-size-asian="10pt"/>
    </style:style>
    <style:style style:name="T18" style:family="text">
      <style:text-properties fo:color="#c0c0c0" loext:opacity="100%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zahl Tickets:- </text:p>
      <text:p text:style-name="P1">SELECT COUNT(*) AS ticket_count</text:p>
      <text:p text:style-name="Standard">FROM otrs_restore.ticket;</text:p>
      <text:p text:style-name="P1"><text:span text:style-name="T1">Ant:- </text:span>ticket_count = 43,153</text:p>
      <text:p text:style-name="Standard"/>
      <text:p text:style-name="Standard">Anzahl Artikel (Nachrichten):-</text:p>
      <text:p text:style-name="Standard">SELECT COUNT(*) AS article_count</text:p>
      <text:p text:style-name="Standard">FROM otrs_restore.article;</text:p>
      <text:p text:style-name="P1"><text:span text:style-name="T1">Ant:- </text:span>article_count = 283,028</text:p>
      <text:p text:style-name="Standard"/>
      <text:p text:style-name="Standard">Wie viele Tickets tatsächlich Artikel enthalten:-</text:p>
      <text:p text:style-name="Standard">SELECT COUNT(DISTINCT ticket_id)</text:p>
      <text:p text:style-name="Standard">FROM otrs_restore.article;</text:p>
      <text:p text:style-name="P2">Ant:- </text:p>
      <text:p text:style-name="P2">jedes Ticket hat mindestens einen Artikel</text:p>
      <text:p text:style-name="P2">es gibt keine offensichtlichen leeren Tickets</text:p>
      <text:p text:style-name="P2">im Mittel hat jedes Ticket etwa 6.56 Artikel</text:p>
      <text:p text:style-name="P2"/>
      <text:p text:style-name="P2">DESCRIBE otrs_restore.article;</text:p>
      <text:p text:style-name="P3">Ant:-</text:p>
      <text:p text:style-name="P3"><draw:frame draw:style-name="fr1" draw:name="Image1" text:anchor-type="char" svg:x="-0.005cm" svg:y="0.42cm" svg:width="8.597cm" svg:height="6.043cm" draw:z-index="0"><draw:image xlink:href="Pictures/10000001000002F900000446FBC0BA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icket</text:p>
      <text:p text:style-name="P3"><text:s text:c="2"/>│</text:p>
      <text:p text:style-name="P3"><text:s text:c="2"/>└── article</text:p>
      <text:p text:style-name="P3"><text:s text:c="8"/>│</text:p>
      <text:p text:style-name="P3"><text:s text:c="8"/>├── article_data_mime (header)</text:p>
      <text:p text:style-name="P3"><text:s text:c="8"/>│ <text:s text:c="7"/>└── subject</text:p>
      <text:p text:style-name="P3"><text:s text:c="8"/>│ <text:s text:c="7"/>└── from</text:p>
      <text:p text:style-name="P3"><text:s text:c="8"/>│</text:p>
      <text:p text:style-name="P3"><text:s text:c="8"/>└── article_data_mime_plain</text:p>
      <text:p text:style-name="P3"><text:s text:c="17"/>└── bod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 loext:marker-style-name="T8"><text:span text:style-name="T2">SELECT</text:span></text:p>
      <text:p text:style-name="P4" loext:marker-style-name="T8"><text:span text:style-name="T4"><text:s text:c="4"/></text:span><text:span text:style-name="T9">a</text:span><text:span text:style-name="T4">.</text:span><text:span text:style-name="T12">ticket_id</text:span><text:span text:style-name="T4">,</text:span></text:p>
      <text:p text:style-name="P4" loext:marker-style-name="T8"><text:span text:style-name="T4"><text:s text:c="4"/></text:span><text:span text:style-name="T9">adm</text:span><text:span text:style-name="T4">.</text:span><text:span text:style-name="T12">a_subject</text:span><text:span text:style-name="T4">,</text:span></text:p>
      <text:p text:style-name="P4" loext:marker-style-name="T8"><text:span text:style-name="T4"><text:s text:c="4"/></text:span><text:span text:style-name="T9">adm</text:span><text:span text:style-name="T4">.</text:span><text:span text:style-name="T12">a_from</text:span><text:span text:style-name="T4">,</text:span></text:p>
      <text:p text:style-name="P4" loext:marker-style-name="T8"><text:span text:style-name="T4"><text:s text:c="4"/></text:span><text:span text:style-name="T9">admp</text:span><text:span text:style-name="T4">.</text:span><text:span text:style-name="T12">body</text:span><text:span text:style-name="T4">,</text:span></text:p>
      <text:p text:style-name="P4" loext:marker-style-name="T8"><text:span text:style-name="T4"><text:s text:c="4"/></text:span><text:span text:style-name="T9">a</text:span><text:span text:style-name="T4">.</text:span><text:span text:style-name="T12">create_time</text:span></text:p>
      <text:p text:style-name="P4" loext:marker-style-name="T8"><text:span text:style-name="T2">FROM</text:span><text:span text:style-name="T4"> </text:span><text:span text:style-name="T15">otrs_restore</text:span><text:span text:style-name="T4">.</text:span><text:span text:style-name="T11">article</text:span><text:span text:style-name="T4"> </text:span><text:span text:style-name="T9">a</text:span></text:p>
      <text:p text:style-name="P4" loext:marker-style-name="T8"><text:span text:style-name="T2">LEFT</text:span><text:span text:style-name="T4"> </text:span><text:span text:style-name="T2">JOIN</text:span><text:span text:style-name="T4"> </text:span><text:span text:style-name="T15">otrs_restore</text:span><text:span text:style-name="T4">.</text:span><text:span text:style-name="T11">article_data_mime</text:span><text:span text:style-name="T4"> </text:span><text:span text:style-name="T9">adm</text:span></text:p>
      <text:p text:style-name="P4" loext:marker-style-name="T8"><text:span text:style-name="T4"><text:s text:c="4"/></text:span><text:span text:style-name="T2">ON</text:span><text:span text:style-name="T4"> </text:span><text:span text:style-name="T9">a</text:span><text:span text:style-name="T4">.</text:span><text:span text:style-name="T12">id</text:span><text:span text:style-name="T4"> = </text:span><text:span text:style-name="T9">adm</text:span><text:span text:style-name="T4">.</text:span><text:span text:style-name="T12">article_id</text:span></text:p>
      <text:p text:style-name="P4" loext:marker-style-name="T8"><text:span text:style-name="T2">LEFT</text:span><text:span text:style-name="T4"> </text:span><text:span text:style-name="T2">JOIN</text:span><text:span text:style-name="T4"> </text:span><text:span text:style-name="T15">otrs_restore</text:span><text:span text:style-name="T4">.</text:span><text:span text:style-name="T11">article_data_mime_plain</text:span><text:span text:style-name="T4"> </text:span><text:span text:style-name="T9">admp</text:span></text:p>
      <text:p text:style-name="P4" loext:marker-style-name="T8"><text:span text:style-name="T4"><text:s text:c="4"/></text:span><text:span text:style-name="T2">ON</text:span><text:span text:style-name="T4"> </text:span><text:span text:style-name="T9">a</text:span><text:span text:style-name="T4">.</text:span><text:span text:style-name="T12">id</text:span><text:span text:style-name="T4"> = </text:span><text:span text:style-name="T9">admp</text:span><text:span text:style-name="T4">.</text:span><text:span text:style-name="T12">article_id</text:span></text:p>
      <text:p text:style-name="P3"><text:span text:style-name="T3">ORDER</text:span><text:span text:style-name="T5"> </text:span><text:span text:style-name="T3">BY</text:span><text:span text:style-name="T5"> </text:span><text:span text:style-name="T10">a</text:span><text:span text:style-name="T5">.</text:span><text:span text:style-name="T13">ticket_id</text:span><text:span text:style-name="T5">, </text:span><text:span text:style-name="T10">a</text:span><text:span text:style-name="T5">.</text:span><text:span text:style-name="T13">create_time</text:span><text:span text:style-name="T7">;</text:span></text:p>
      <text:p text:style-name="P3"><text:span text:style-name="T7"/></text:p>
      <text:p text:style-name="P3"><draw:frame draw:style-name="fr1" draw:name="Image2" text:anchor-type="char" svg:x="-0.051cm" svg:y="0.108cm" svg:width="12.077cm" svg:height="4.937cm" draw:z-index="1"><draw:image xlink:href="Pictures/100000010000050C0000044634B570BB.png" xlink:type="simple" xlink:show="embed" xlink:actuate="onLoad" draw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4" loext:marker-style-name="T8"><text:span text:style-name="T3">SELECT</text:span></text:p>
      <text:p text:style-name="P4" loext:marker-style-name="T8"><text:span text:style-name="T4"><text:s text:c="4"/></text:span><text:span text:style-name="T9">u</text:span><text:span text:style-name="T4">.</text:span><text:span text:style-name="T12">first_name</text:span><text:span text:style-name="T4">,</text:span></text:p>
      <text:p text:style-name="P4" loext:marker-style-name="T8"><text:span text:style-name="T4"><text:s text:c="4"/></text:span><text:span text:style-name="T9">u</text:span><text:span text:style-name="T4">.</text:span><text:span text:style-name="T12">last_name</text:span><text:span text:style-name="T4">,</text:span></text:p>
      <text:p text:style-name="P4" loext:marker-style-name="T8"><text:span text:style-name="T4"><text:s text:c="4"/></text:span><text:span text:style-name="T9">u</text:span><text:span text:style-name="T4">.</text:span><text:span text:style-name="T12">login</text:span><text:span text:style-name="T4">,</text:span></text:p>
      <text:p text:style-name="P4" loext:marker-style-name="T8"><text:span text:style-name="T4"><text:s text:c="4"/></text:span><text:span text:style-name="T16">COUNT</text:span><text:span text:style-name="T4">(*) </text:span><text:span text:style-name="T2">AS</text:span><text:span text:style-name="T4"> </text:span><text:span text:style-name="T14">closed_tickets</text:span></text:p>
      <text:p text:style-name="P4" loext:marker-style-name="T8"><text:span text:style-name="T2">FROM</text:span><text:span text:style-name="T4"> </text:span><text:span text:style-name="T15">otrs_restore</text:span><text:span text:style-name="T4">.</text:span><text:span text:style-name="T11">ticket_history</text:span><text:span text:style-name="T4"> </text:span><text:span text:style-name="T9">th</text:span></text:p>
      <text:p text:style-name="P4" loext:marker-style-name="T8"><text:span text:style-name="T2">JOIN</text:span><text:span text:style-name="T4"> </text:span><text:span text:style-name="T15">otrs_restore</text:span><text:span text:style-name="T4">.</text:span><text:span text:style-name="T11">users</text:span><text:span text:style-name="T4"> </text:span><text:span text:style-name="T9">u</text:span></text:p>
      <text:p text:style-name="P4" loext:marker-style-name="T8"><text:span text:style-name="T4"><text:s text:c="4"/></text:span><text:span text:style-name="T2">ON</text:span><text:span text:style-name="T4"> </text:span><text:span text:style-name="T9">th</text:span><text:span text:style-name="T4">.</text:span><text:span text:style-name="T12">create_by</text:span><text:span text:style-name="T4"> = </text:span><text:span text:style-name="T9">u</text:span><text:span text:style-name="T4">.</text:span><text:span text:style-name="T12">id</text:span></text:p>
      <text:p text:style-name="P4" loext:marker-style-name="T8"><text:span text:style-name="T2">WHERE</text:span><text:span text:style-name="T4"> </text:span><text:span text:style-name="T16">LOWER</text:span><text:span text:style-name="T4">(</text:span><text:span text:style-name="T9">th</text:span><text:span text:style-name="T4">.</text:span><text:span text:style-name="T12">name</text:span><text:span text:style-name="T4">) </text:span><text:span text:style-name="T2">LIKE</text:span><text:span text:style-name="T4"> </text:span><text:span text:style-name="T17">'%close%'</text:span></text:p>
      <text:p text:style-name="P4" loext:marker-style-name="T8"><text:span text:style-name="T2">GROUP</text:span><text:span text:style-name="T4"> </text:span><text:span text:style-name="T2">BY</text:span><text:span text:style-name="T4"> </text:span><text:span text:style-name="T9">u</text:span><text:span text:style-name="T4">.</text:span><text:span text:style-name="T12">id</text:span><text:span text:style-name="T4">, </text:span><text:span text:style-name="T9">u</text:span><text:span text:style-name="T4">.</text:span><text:span text:style-name="T12">first_name</text:span><text:span text:style-name="T4">, </text:span><text:span text:style-name="T9">u</text:span><text:span text:style-name="T4">.</text:span><text:span text:style-name="T12">last_name</text:span><text:span text:style-name="T4">, </text:span><text:span text:style-name="T9">u</text:span><text:span text:style-name="T4">.</text:span><text:span text:style-name="T12">login</text:span></text:p>
      <text:p text:style-name="P4" loext:marker-style-name="T8"><text:span text:style-name="T2">ORDER</text:span><text:span text:style-name="T4"> </text:span><text:span text:style-name="T2">BY</text:span><text:span text:style-name="T4"> </text:span><text:span text:style-name="T14">closed_tickets</text:span><text:span text:style-name="T4"> </text:span><text:span text:style-name="T2">DESC</text:span></text:p>
      <text:p text:style-name="P3"><text:span text:style-name="T2">LIMIT</text:span><text:span text:style-name="T4"> </text:span><text:span text:style-name="T18">20</text:span><text:span text:style-name="T6">;</text:span></text:p>
      <text:p text:style-name="P3"><draw:frame draw:style-name="fr1" draw:name="Image3" text:anchor-type="char" svg:x="-0.026cm" svg:y="0.28cm" svg:width="15.699cm" svg:height="6.186cm" draw:z-index="2"><draw:image xlink:href="Pictures/100000010000050C0000041869BF1ADA.png" xlink:type="simple" xlink:show="embed" xlink:actuate="onLoad" draw:mime-type="image/png"/></draw:frame></text:p>
      <text:p text:style-name="P3"><text:soft-page-break/><text:span text:style-name="T7"/></text:p>
      <text:p text:style-name="P5">x11vnc -display :0 -auth guess -forever -loop -noxdamage -repeat -rfbauth ~/.vnc/passwd -rfbport 5900 -shared &amp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6:04:01.885812235</meta:creation-date>
    <dc:date>2026-04-27T13:06:26.855185429</dc:date>
    <meta:editing-duration>PT48M32S</meta:editing-duration>
    <meta:editing-cycles>5</meta:editing-cycles>
    <meta:generator>LibreOffice/24.2.7.2$Linux_X86_64 LibreOffice_project/420$Build-2</meta:generator>
    <meta:document-statistic meta:table-count="0" meta:image-count="3" meta:object-count="0" meta:page-count="3" meta:paragraph-count="52" meta:word-count="156" meta:character-count="1386" meta:non-whitespace-character-count="1149"/>
  </office:meta>
</office:document-meta>
</file>